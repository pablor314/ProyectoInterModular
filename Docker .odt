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eb9f" officeooo:paragraph-rsid="0011eb9f"/>
    </style:style>
    <style:style style:name="P2" style:family="paragraph" style:parent-style-name="Standard">
      <style:text-properties officeooo:rsid="00125c80" officeooo:paragraph-rsid="00125c80"/>
    </style:style>
    <style:style style:name="P3" style:family="paragraph" style:parent-style-name="Standard">
      <style:text-properties officeooo:rsid="00145c1e" officeooo:paragraph-rsid="00145c1e"/>
    </style:style>
    <style:style style:name="P4" style:family="paragraph" style:parent-style-name="Standard" style:list-style-name="L1">
      <style:text-properties officeooo:rsid="00145c1e" officeooo:paragraph-rsid="00145c1e"/>
    </style:style>
    <style:style style:name="P5" style:family="paragraph" style:parent-style-name="Standard" style:list-style-name="L1">
      <style:text-properties officeooo:paragraph-rsid="00145c1e"/>
    </style:style>
    <style:style style:name="P6" style:family="paragraph" style:parent-style-name="Standard" style:list-style-name="L1">
      <style:text-properties officeooo:rsid="00150738" officeooo:paragraph-rsid="00150738"/>
    </style:style>
    <style:style style:name="T1" style:family="text">
      <style:text-properties officeooo:rsid="00145c1e"/>
    </style:style>
    <style:style style:name="T2" style:family="text">
      <style:text-properties officeooo:rsid="0015073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poder hacer el servidor vamos a necesitar la herramienta de raspberry pi, donde meteremos el docker, pero debemos de meter “dos” dockers, para que funcione necesitariamos el docker engine, que seria el principal, y por otro lado el docker compose para poder definir varios contenedores</text:p>
      <text:p text:style-name="P1"/>
      <text:p text:style-name="P1">Para la parte web, vamos a necesitar portainer, para poder administrar la interfaz web del docker mas facil</text:p>
      <text:p text:style-name="P1"/>
      <text:p text:style-name="P2">por otro lado meteremos el Traefik, que es un proxy “inverso” de codigo abierto, el cual esta diseñado para facilitar la implementación de microserviciós, el cual se integra de manera automatica, tambien intercepta el trsafico entrante.</text:p>
      <text:p text:style-name="P2"/>
      <text:p text:style-name="P3">Por parte de la seguridad vamos a poner tres “aplicaciones”</text:p>
      <text:list text:style-name="L1">
        <text:list-item>
          <text:p text:style-name="P5"><text:span text:style-name="T1">El fail2ban, que protege antes intentos inadecuados</text:span></text:p>
        </text:list-item>
        <text:list-item>
          <text:p text:style-name="P4">El watchtower, actualiza <text:span text:style-name="T2">automaticamente los contenedores</text:span></text:p>
        </text:list-item>
        <text:list-item>
          <text:p text:style-name="P6">Firewall o UFW, el cual es para poder gestionar y administrar el firewall loc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09T08:52:05.445000000</meta:creation-date>
    <dc:date>2025-12-09T09:03:50.324000000</dc:date>
    <meta:editing-duration>PT1M45S</meta:editing-duration>
    <meta:editing-cycles>1</meta:editing-cycles>
    <meta:document-statistic meta:table-count="0" meta:image-count="0" meta:object-count="0" meta:page-count="1" meta:paragraph-count="7" meta:word-count="140" meta:character-count="883" meta:non-whitespace-character-count="752"/>
    <meta:generator>LibreOffice/24.2.4.2$Windows_X86_64 LibreOffice_project/51a6219feb6075d9a4c46691dcfe0cd9c4fff3c2</meta:generator>
  </office:meta>
</office:document-meta>
</file>