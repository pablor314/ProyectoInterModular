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974cm" fo:margin-left="0.028cm" fo:margin-top="0cm" fo:margin-bottom="0cm" table:align="left"/>
    </style:style>
    <style:style style:name="Table1.A" style:family="table-column">
      <style:table-column-properties style:column-width="7.262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5.023cm" fo:margin-left="-0.032cm" fo:margin-top="0cm" fo:margin-bottom="0cm" table:align="left"/>
    </style:style>
    <style:style style:name="Table2.A" style:family="table-column">
      <style:table-column-properties style:column-width="2.94cm"/>
    </style:style>
    <style:style style:name="Table2.B" style:family="table-column">
      <style:table-column-properties style:column-width="12.083cm"/>
    </style:style>
    <style:style style:name="Table2.1" style:family="table-row">
      <style:table-row-properties style:min-row-height="0.6cm" fo:keep-together="auto"/>
    </style:style>
    <style:style style:name="Table2.A1" style:family="table-cell">
      <style:table-cell-properties fo:padding-left="0.191cm" fo:padding-right="0.191cm" fo:padding-top="0cm" fo:padding-bottom="0cm" fo:border="none"/>
    </style:style>
    <style:style style:name="Table2.B1" style:family="table-cell">
      <style:table-cell-properties fo:padding-left="0.191cm" fo:padding-right="0.191cm" fo:padding-top="0cm" fo:padding-bottom="0cm" fo:border-left="none" fo:border-right="none" fo:border-top="none" fo:border-bottom="0.5pt solid #000000"/>
    </style:style>
    <style:style style:name="Table2.B2" style:family="table-cell">
      <style:table-cell-properties fo:padding-left="0.191cm" fo:padding-right="0.191cm" fo:padding-top="0cm" fo:padding-bottom="0cm" fo:border-left="none" fo:border-right="none" fo:border-top="0.5pt solid #000000" fo:border-bottom="0.5pt solid #000000"/>
    </style:style>
    <style:style style:name="Tabla1" style:family="table">
      <style:table-properties style:width="14.947cm" table:align="left"/>
    </style:style>
    <style:style style:name="Tabla1.A" style:family="table-column">
      <style:table-column-properties style:column-width="3.948cm"/>
    </style:style>
    <style:style style:name="Tabla1.B" style:family="table-column">
      <style:table-column-properties style:column-width="9.179cm"/>
    </style:style>
    <style:style style:name="Tabla1.C" style:family="table-column">
      <style:table-column-properties style:column-width="1.82cm"/>
    </style:style>
    <style:style style:name="Tabla1.A1" style:family="table-cell">
      <style:table-cell-properties style:vertical-align="middle" fo:padding="0.049c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f945" officeooo:paragraph-rsid="0003f945"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5" style:family="paragraph" style:parent-style-name="Standard">
      <style:text-properties fo:font-size="9pt" fo:font-style="italic" style:font-size-asian="9pt" style:font-style-asian="italic" style:font-size-complex="9pt"/>
    </style:style>
    <style:style style:name="P6" style:family="paragraph" style:parent-style-name="Standard">
      <style:paragraph-properties fo:text-align="end" style:justify-single-word="false"/>
      <style:text-properties fo:font-size="9pt" fo:font-style="italic" style:font-size-asian="9pt" style:font-style-asian="italic" style:font-size-complex="9pt"/>
    </style:style>
    <style:style style:name="P7" style:family="paragraph" style:parent-style-name="Standard">
      <style:text-properties officeooo:paragraph-rsid="000466b4"/>
    </style:style>
    <style:style style:name="P8" style:family="paragraph" style:parent-style-name="Heading_20_1" style:list-style-name="WWNum1"/>
    <style:style style:name="P9" style:family="paragraph" style:parent-style-name="Heading_20_1" style:list-style-name="WWNum1">
      <style:text-properties officeooo:paragraph-rsid="000466b4"/>
    </style:style>
    <style:style style:name="P10"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1" style:family="paragraph" style:parent-style-name="Standard" style:list-style-name="WWNum1"/>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text-properties officeooo:paragraph-rsid="0007232c"/>
    </style:style>
    <style:style style:name="P17" style:family="paragraph" style:parent-style-name="Text_20_body">
      <style:text-properties fo:font-style="italic" officeooo:paragraph-rsid="00120612" style:font-style-asian="italic"/>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WWNum1">
      <style:paragraph-properties fo:text-align="start"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list-style-name="L10">
      <style:paragraph-properties fo:text-align="start" style:justify-single-word="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T1" style:family="text">
      <style:text-properties officeooo:rsid="000466b4"/>
    </style:style>
    <style:style style:name="T2" style:family="text">
      <style:text-properties officeooo:rsid="0006524d"/>
    </style:style>
    <style:style style:name="T3" style:family="text">
      <style:text-properties officeooo:rsid="0007232c"/>
    </style:style>
    <style:style style:name="T4" style:family="text">
      <style:text-properties officeooo:rsid="00087be4"/>
    </style:style>
    <style:style style:name="T5" style:family="text">
      <style:text-properties officeooo:rsid="00097bf5"/>
    </style:style>
    <style:style style:name="T6" style:family="text">
      <style:text-properties officeooo:rsid="000b3a0f"/>
    </style:style>
    <style:style style:name="T7" style:family="text">
      <style:text-properties officeooo:rsid="000d4952"/>
    </style:style>
    <style:style style:name="T8" style:family="text">
      <style:text-properties officeooo:rsid="000f0e4f"/>
    </style:style>
    <style:style style:name="T9" style:family="text">
      <style:text-properties officeooo:rsid="000f136e"/>
    </style:style>
    <style:style style:name="T10" style:family="text">
      <style:text-properties officeooo:rsid="000f3c96"/>
    </style:style>
    <style:style style:name="T11" style:family="text">
      <style:text-properties officeooo:rsid="0012061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le1" table:style-name="Table1">
        <table:table-column table:style-name="Table1.A"/>
        <table:table-column table:style-name="Table1.B"/>
        <table:table-row table:style-name="Table1.1">
          <table:table-cell table:style-name="Table1.A1" office:value-type="string">
            <text:p text:style-name="P5">Dpto. Informática - I.E.S. La Marisma</text:p>
          </table:table-cell>
          <table:table-cell table:style-name="Table1.A1" office:value-type="string">
            <text:p text:style-name="P6"><text:bookmark text:name="_d315k7i4y7vh"/>C.F.G.M. Sistemas Microinformáticos y Redes</text:p>
          </table:table-cell>
        </table:table-row>
      </table:table>
      <text:p text:style-name="Title">PROPUESTA DE PROYECTO </text:p>
      <text:p text:style-name="P2"/>
      <table:table table:name="Table2" table:style-name="Table2">
        <table:table-column table:style-name="Table2.A"/>
        <table:table-column table:style-name="Table2.B"/>
        <table:table-row table:style-name="Table2.1">
          <table:table-cell table:style-name="Table2.A1" office:value-type="string">
            <text:p text:style-name="P1">Nombre del proyecto:</text:p>
          </table:table-cell>
          <table:table-cell table:style-name="Table2.B1" office:value-type="string">
            <text:p text:style-name="P17"><text:span text:style-name="Strong_20_Emphasis"><text:span text:style-name="T11">Servidor Docker en Rasp Berrypi</text:span></text:span></text:p>
          </table:table-cell>
        </table:table-row>
        <table:table-row table:style-name="Table2.1">
          <table:table-cell table:style-name="Table2.A1" office:value-type="string">
            <text:p text:style-name="P1">Alumno:</text:p>
          </table:table-cell>
          <table:table-cell table:style-name="Table2.B2" office:value-type="string">
            <text:p text:style-name="P3">Pablo Rodríguez escobar</text:p>
          </table:table-cell>
        </table:table-row>
        <table:table-row table:style-name="Table2.1">
          <table:table-cell table:style-name="Table2.A1" office:value-type="string">
            <text:p text:style-name="P1">Curso:</text:p>
          </table:table-cell>
          <table:table-cell table:style-name="Table2.B2" office:value-type="string">
            <text:p text:style-name="P3">2º SMR</text:p>
          </table:table-cell>
        </table:table-row>
        <table:table-row table:style-name="Table2.1">
          <table:table-cell table:style-name="Table2.A1" office:value-type="string">
            <text:p text:style-name="P1">Tutor:</text:p>
          </table:table-cell>
          <table:table-cell table:style-name="Table2.B2" office:value-type="string">
            <text:p text:style-name="P4">Déjese este campo en blanco. </text:p>
          </table:table-cell>
        </table:table-row>
      </table:table>
      <text:list text:style-name="WWNum1">
        <text:list-header>
          <text:p text:style-name="P11"/>
        </text:list-header>
        <text:list-item>
          <text:p text:style-name="P9">OBJETIVOS</text:p>
        </text:list-item>
      </text:list>
      <text:p text:style-name="Standard"/>
      <text:p text:style-name="Standard">El proyecto consiste en convertir una Raspberry Pi en un servidor ligero utilizando Docker. La Raspberry Pi, por su bajo costo y consumo energético, es ideal para mantener servicios funcionando de forma continua. Sobre un sistema operativo minimalista (como Raspberry Pi OS Lite), se instala Docker, que permite ejecutar aplicaciones dentro de contenedores aislados, evitando conflictos y facilitando su actualización o eliminación. </text:p>
      <text:p text:style-name="Standard"/>
      <text:list text:continue-numbering="true" text:style-name="WWNum1">
        <text:list-item>
          <text:p text:style-name="P8">ANÁLISIS DE LO EXISTENTE</text:p>
        </text:list-item>
      </text:list>
      <text:p text:style-name="Standard"/>
      <text:p text:style-name="P16"><text:span text:style-name="T3">Existen muchos tipos de servidores de docker, per</text:span><text:span text:style-name="T4">o </text:span><text:span text:style-name="T3">estos servidores, son muy poco economicos, tanto por los gastos de hardware </text:span><text:span text:style-name="T4">como los gastos de mentenimiento, e incluso </text:span><text:span text:style-name="T5">altos</text:span><text:span text:style-name="T4"> gastos de reabastecimiento electrico, </text:span><text:span text:style-name="T6">en cambio, los servidores en rasp berrypi, son mucho mas lijeros, </text:span><text:span text:style-name="T7">ya que </text:span><text:span text:style-name="T8">los</text:span><text:span text:style-name="T7"> costes hardware </text:span><text:span text:style-name="T8">son </text:span><text:span text:style-name="T9">muy bajos, ya que seria el gasto inicial de los componentes y algo mas en el caso de que algun componente se rompa, </text:span><text:span text:style-name="T10">y por la parte de costos de reabastecimiento, son minimos, ya que una rasp berrypi no consume nada </text:span></text:p>
      <text:p text:style-name="P16"/>
      <text:list xml:id="list92206586951258" text:continue-numbering="true" text:style-name="WWNum1">
        <text:list-item>
          <text:p text:style-name="P8">ANÁLISIS DEL SISTEMA</text:p>
        </text:list-item>
      </text:list>
      <text:p text:style-name="Standard"/>
      <text:list text:style-name="L5">
        <text:list-item>
          <text:p text:style-name="P18"><text:span text:style-name="Strong_20_Emphasis">Servidor base (Raspberry Pi):</text:span> actuará como plataforma física del sistema, proporcionando la potencia de cálculo, almacenamiento y conectividad necesarios para ejecutar los servicios.</text:p>
        </text:list-item>
      </text:list>
      <text:list text:style-name="L6">
        <text:list-item>
          <text:p text:style-name="P19"><text:span text:style-name="Strong_20_Emphasis">Entorno Docker:</text:span> encargado de crear, ejecutar y aislar los contenedores que alojarán los distintos servicios. Permite un sistema modular, seguro y fácil de mantener.</text:p>
        </text:list-item>
      </text:list>
      <text:list text:style-name="L7">
        <text:list-item>
          <text:p text:style-name="P20"><text:span text:style-name="Strong_20_Emphasis">Gestor de contenedores (Docker Compose):</text:span> responsable de definir la <text:soft-page-break/>configuración de cada servicio, gestionar dependencias, redes internas y volúmenes persistentes, y facilitar el despliegue conjunto de varios contenedores.</text:p>
        </text:list-item>
      </text:list>
      <text:list text:style-name="L8">
        <text:list-item>
          <text:p text:style-name="P21"><text:span text:style-name="Strong_20_Emphasis">Servicios en contenedores:</text:span> aplicaciones independientes que cumplirán funciones concretas, como servidor web, base de datos, sistema de bloqueo de publicidad, nube privada u otros servicios necesarios para el servidor.</text:p>
        </text:list-item>
      </text:list>
      <text:list text:style-name="L9">
        <text:list-item>
          <text:p text:style-name="P22"><text:span text:style-name="Strong_20_Emphasis">Panel de administración (opcional):</text:span> herramientas como Portainer permitirán supervisar contenedores, revisar logs, actualizar imágenes y gestionar recursos mediante una interfaz gráfica.</text:p>
        </text:list-item>
      </text:list>
      <text:list xml:id="list92205415157792" text:continue-list="list92206586951258" text:style-name="WWNum1">
        <text:list-item>
          <text:p text:style-name="P8">DISEÑO DEL SISTEMA </text:p>
          <text:p text:style-name="P23">El diseño del sistema se basa en una arquitectura modular que permite desplegar y gestionar diferentes servicios dentro de contenedores Docker, manteniendo una estructura clara, escalable y fácil de administrar. La Raspberry Pi actúa como núcleo del sistema, mientras que Docker organiza los servicios que serán ejecutados de forma independiente.</text:p>
        </text:list-item>
      </text:list>
      <text:p text:style-name="P24">El sistema se diseña a partir de los siguientes elementos:</text:p>
      <text:list text:style-name="L10">
        <text:list-item>
          <text:p text:style-name="P25"><text:span text:style-name="Strong_20_Emphasis">Capa física (hardware):</text:span><text:line-break/>La Raspberry Pi funcionará como servidor principal. Su diseño compacto y bajo consumo la convierten en el dispositivo ideal para alojar los contenedores sin necesidad de equipos más grandes o costosos.</text:p>
        </text:list-item>
        <text:list-item>
          <text:p text:style-name="P25"><text:span text:style-name="Strong_20_Emphasis">Capa del sistema operativo:</text:span><text:line-break/>Se utilizará una distribución ligera como Raspberry Pi OS Lite, que permite dedicar la mayor parte de los recursos disponibles a los contenedores. El sistema operativo se configurará para arrancar automáticamente los servicios y garantizar estabilidad 24/7.</text:p>
        </text:list-item>
        <text:list-item>
          <text:p text:style-name="P25"><text:span text:style-name="Strong_20_Emphasis">Capa de contenedorización (Docker):</text:span><text:line-break/>Docker será el encargado de ejecutar cada servicio dentro de un contenedor aislado. Este diseño evita conflictos entre aplicaciones, permite actualizar cada servicio sin afectar al resto y facilita la sustitución o ampliación del sistema en el futuro.</text:p>
        </text:list-item>
        <text:list-item>
          <text:p text:style-name="P25"><text:span text:style-name="Strong_20_Emphasis">Capa de orquestación (Docker Compose):</text:span><text:line-break/>Docker Compose permitirá definir las configuraciones de red, almacenamiento y dependencias entre contenedores. Gracias a un único archivo de configuración, será posible desplegar todo el sistema o modificarlo de forma centralizada.</text:p>
        </text:list-item>
        <text:list-item>
          <text:p text:style-name="P25"><text:span text:style-name="Strong_20_Emphasis">Servicios implementados:</text:span><text:line-break/>Cada servicio (como servidor web, base de datos, sistema DNS, nube privada, <text:soft-page-break/>entre otros) se diseñará como un contenedor independiente. Esto proporciona flexibilidad, ya que se pueden añadir o eliminar servicios sin alterar la estructura del sistema.</text:p>
        </text:list-item>
        <text:list-item>
          <text:p text:style-name="P25"><text:span text:style-name="Strong_20_Emphasis">Gestión y monitoreo:</text:span><text:line-break/>Si se requiere una interfaz visual, se incluirá un panel opcional como Portainer. Este panel permitirá supervisar el estado del sistema, gestionar contenedores, revisar registros y monitorizar el rendimiento sin necesidad de usar únicamente la línea de comandos.</text:p>
        </text:list-item>
      </text:list>
      <text:list text:continue-list="list92205415157792" text:style-name="WWNum1">
        <text:list-item>
          <text:p text:style-name="P8">ESTIMACIÓN DE COSTES</text:p>
        </text:list-item>
      </text:list>
      <text:p text:style-name="Standard"/>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Concepto</text:p>
            </table:table-cell>
            <table:table-cell table:style-name="Tabla1.A1" office:value-type="string">
              <text:p text:style-name="Table_20_Heading">Detalle</text:p>
            </table:table-cell>
            <table:table-cell table:style-name="Tabla1.A1" office:value-type="string">
              <text:p text:style-name="Table_20_Heading">Coste (€)</text:p>
            </table:table-cell>
          </table:table-row>
        </table:table-header-rows>
        <table:table-row>
          <table:table-cell table:style-name="Tabla1.A1" office:value-type="string">
            <text:p text:style-name="Table_20_Contents">Hardware</text:p>
          </table:table-cell>
          <table:table-cell table:style-name="Tabla1.A1" office:value-type="string">
            <text:p text:style-name="Table_20_Contents">Raspberry Pi 4/5 + SSD/microSD + accesorios</text:p>
          </table:table-cell>
          <table:table-cell table:style-name="Tabla1.A1" office:value-type="string">
            <text:p text:style-name="Table_20_Contents">100–175</text:p>
          </table:table-cell>
        </table:table-row>
        <table:table-row>
          <table:table-cell table:style-name="Tabla1.A1" office:value-type="string">
            <text:p text:style-name="Table_20_Contents">Software</text:p>
          </table:table-cell>
          <table:table-cell table:style-name="Tabla1.A1" office:value-type="string">
            <text:p text:style-name="Table_20_Contents">Raspberry Pi OS, Docker, servicios contenedorizados</text:p>
          </table:table-cell>
          <table:table-cell table:style-name="Tabla1.A1" office:value-type="string">
            <text:p text:style-name="Table_20_Contents">0–20</text:p>
          </table:table-cell>
        </table:table-row>
        <table:table-row>
          <table:table-cell table:style-name="Tabla1.A1" office:value-type="string">
            <text:p text:style-name="Table_20_Contents">Red / Conectividad</text:p>
          </table:table-cell>
          <table:table-cell table:style-name="Tabla1.A1" office:value-type="string">
            <text:p text:style-name="Table_20_Contents">Cables Ethernet, uso de red existente</text:p>
          </table:table-cell>
          <table:table-cell table:style-name="Tabla1.A1" office:value-type="string">
            <text:p text:style-name="Table_20_Contents">0–10</text:p>
          </table:table-cell>
        </table:table-row>
        <table:table-row>
          <table:table-cell table:style-name="Tabla1.A1" office:value-type="string">
            <text:p text:style-name="Table_20_Contents">Mantenimiento anual</text:p>
          </table:table-cell>
          <table:table-cell table:style-name="Tabla1.A1" office:value-type="string">
            <text:p text:style-name="Table_20_Contents">Electricidad y soporte básico</text:p>
          </table:table-cell>
          <table:table-cell table:style-name="Tabla1.A1" office:value-type="string">
            <text:p text:style-name="Table_20_Contents">5–15</text:p>
          </table:table-cell>
        </table:table-row>
        <table:table-row>
          <table:table-cell table:style-name="Tabla1.A1" office:value-type="string">
            <text:p text:style-name="Table_20_Contents"><text:span text:style-name="Strong_20_Emphasis">Total estimado</text:span></text:p>
          </table:table-cell>
          <table:table-cell table:style-name="Tabla1.A1" office:value-type="string">
            <text:p text:style-name="Table_20_Contents">—</text:p>
          </table:table-cell>
          <table:table-cell table:style-name="Tabla1.A1" office:value-type="string">
            <text:p text:style-name="Table_20_Contents"><text:span text:style-name="Strong_20_Emphasis">105–220</text:span></text:p>
          </table:table-cell>
        </table:table-row>
      </table:table>
      <text:p text:style-name="Standard"/>
      <text:p text:style-name="P7"/>
      <text:list text:continue-numbering="true" text:style-name="WWNum1">
        <text:list-item>
          <text:p text:style-name="P8"><text:bookmark text:name="_1k7ygmyrayyz"/>CONTENIDOS TRANSVERSALES</text:p>
        </text:list-item>
      </text:list>
      <text:list text:style-name="L11">
        <text:list-item>
          <text:p text:style-name="P26"><text:span text:style-name="Strong_20_Emphasis">Sistemas y redes:</text:span> administración de servidores, configuración de redes locales y gestión de contenedores Docker.</text:p>
        </text:list-item>
      </text:list>
      <text:list text:style-name="L12">
        <text:list-item>
          <text:p text:style-name="P27"><text:span text:style-name="Strong_20_Emphasis">Programación y automatización:</text:span> creación de scripts y configuración de servicios para automatizar tareas.</text:p>
        </text:list-item>
      </text:list>
      <text:list text:style-name="L13">
        <text:list-item>
          <text:p text:style-name="P28"><text:span text:style-name="Strong_20_Emphasis">Seguridad informática:</text:span> control de accesos, aislamiento de contenedores y buenas prácticas en servidores.</text:p>
        </text:list-item>
      </text:list>
      <text:list text:style-name="L14">
        <text:list-item>
          <text:p text:style-name="P29"><text:span text:style-name="Strong_20_Emphasis">Gestión de proyectos y documentación:</text:span> planificación del proyecto, estimación de costes y elaboración de informes técnicos.</text:p>
        </text:list-item>
      </text:list>
      <text:list text:style-name="L15">
        <text:list-item>
          <text:p text:style-name="P30"><text:span text:style-name="Strong_20_Emphasis">Competencias digitales y trabajo en equipo:</text:span> uso de herramientas de administración, colaboración y resolución de problemas en entornos práctico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5-11-18T09:22:04.784000000</dc:date>
    <meta:editing-duration>PT7H59M20S</meta:editing-duration>
    <meta:editing-cycles>16</meta:editing-cycles>
    <meta:document-statistic meta:table-count="3" meta:image-count="0" meta:object-count="0" meta:page-count="3" meta:paragraph-count="55" meta:word-count="759" meta:character-count="5190" meta:non-whitespace-character-count="4495"/>
    <meta:user-defined meta:name="AppVersion">15.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